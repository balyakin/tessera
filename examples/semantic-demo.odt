
<file path=content.xml><?xml version="1.0" encoding="utf-8"?>
<office:document-content xmlns:office="urn:oasis:names:tc:opendocument:xmlns:office:1.0" xmlns:text="urn:oasis:names:tc:opendocument:xmlns:text:1.0" xmlns:draw="urn:oasis:names:tc:opendocument:xmlns:drawing:1.0" xmlns:xlink="http://www.w3.org/1999/xlink" office:version="1.3">
  <office:body>
    <office:text>
      <text:h text:style-name="Heading 1" text:outline-level="1">The Semantic Chapter</text:h>
      <text:p text:style-name="Text Body">This paragraph keeps <text:span text:style-name="Direct Thought">a private thought</text:span> and <text:span text:style-name="Foreign - Latin">veritas</text:span> as named character styles.</text:p>
      <text:p text:style-name="Poem">First semantic line<text:line-break/>Second semantic line</text:p>
      <text:p text:style-name="Letter">Dear reader, the letter role is preserved.</text:p>
      <text:p text:style-name="Epigraph">Words before the story should remain an epigraph.</text:p>
      <text:p text:style-name="Quote">A quoted block keeps its structure.</text:p>
      <text:list>
        <text:list-item>
          <text:p text:style-name="Text Body">One item</text:p>
        </text:list-item>
        <text:list-item>
          <text:p text:style-name="Text Body">Another item</text:p>
        </text:list-item>
      </text:list>
      <text:p text:style-name="Text Body">A note appears here<text:note text:note-class="footnote" text:id="1"><text:note-citation>1</text:note-citation><text:note-body><text:p text:style-name="Text Body">Synthetic footnote text.</text:p></text:note-body></text:note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>
  <office:styles>
    <style:style style:name="Heading 1" style:family="paragraph"/>
    <style:style style:name="Text Body" style:family="paragraph"/>
    <style:style style:name="Poem" style:family="paragraph"/>
    <style:style style:name="Letter" style:family="paragraph"/>
    <style:style style:name="Epigraph" style:family="paragraph"/>
    <style:style style:name="Quote" style:family="paragraph"/>
    <style:style style:name="Direct Thought" style:family="text"/>
    <style:style style:name="Foreign - Latin" style:family="text"/>
  </office:styles>
</office:document-styles>
</file>

<file path=meta.xml><?xml version="1.0" encoding="utf-8"?>
<office:document-meta xmlns:office="urn:oasis:names:tc:opendocument:xmlns:office:1.0" xmlns:dc="http://purl.org/dc/elements/1.1/">
  <office:meta>
    <dc:title>Tessera Semantic Demo</dc:title>
    <dc:creator>Evgeny Balyakin</dc:creator>
    <dc:language>en</dc:language>
    <dc:description>Synthetic Tessera demo manuscript.</dc:description>
  </office:meta>
</office:document-meta>
</file>